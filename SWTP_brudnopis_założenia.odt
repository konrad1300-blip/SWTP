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81c" officeooo:paragraph-rsid="0009381c"/>
    </style:style>
    <style:style style:name="P2" style:family="paragraph" style:parent-style-name="Standard">
      <style:text-properties officeooo:rsid="00098067" officeooo:paragraph-rsid="00098067"/>
    </style:style>
    <style:style style:name="P3" style:family="paragraph" style:parent-style-name="Standard">
      <style:text-properties officeooo:rsid="00098067" officeooo:paragraph-rsid="000aeb52"/>
    </style:style>
    <style:style style:name="P4" style:family="paragraph" style:parent-style-name="Standard">
      <style:text-properties officeooo:rsid="000aeb52" officeooo:paragraph-rsid="000aeb52"/>
    </style:style>
    <style:style style:name="P5" style:family="paragraph" style:parent-style-name="Standard">
      <style:text-properties officeooo:rsid="000d494e" officeooo:paragraph-rsid="000d494e"/>
    </style:style>
    <style:style style:name="T1" style:family="text">
      <style:text-properties officeooo:rsid="00098067"/>
    </style:style>
    <style:style style:name="T2" style:family="text">
      <style:text-properties officeooo:rsid="000aeb52"/>
    </style:style>
    <style:style style:name="T3" style:family="text">
      <style:text-properties officeooo:rsid="000c8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Wycen Technologii i Planowania</text:p>
      <text:p text:style-name="P1"/>
      <text:p text:style-name="P1">Generuj kod źródłowy z obszernymi komentarzami w języku polskim.</text:p>
      <text:p text:style-name="P1">Celem jest stworzenie aplikacji docelowo do umieszczenia na serwerze lokalnym firmy i do wykorzystania w formowej sieci LAN. Aplikacja ma wspomagać system wycen produktów, konstruowania technologii i sposobu planowania produkcji. <text:span text:style-name="T1">Aplikacja działa na podstawie następujących po sobie kroków, niektóre z kroków będą wymagały zagłębienia się w szczegóły w takim przypadku idealnie od strony interfejsu byłoby wprowadzenie kard. Początkowo przewiduje dla aplikacji bazę danych SQLite być może z możliwością późniejszej zmiany na bardziej zaawansowaną bazę danych. Do aplikacji trzeba się będzie zalogować w celu ustalenia tożsamości użytkownika.</text:span></text:p>
      <text:p text:style-name="P1"/>
      <text:p text:style-name="P2">1. Harmonogram.</text:p>
      <text:p text:style-name="P3">Pierwszym etapem <text:span text:style-name="T2">jest stworzenie harmonogramu. Do firmy przychodzą zapytania od klientów i zamówienia. Przychodzą one do działu ORDERS albo z centrali w Danii i ten dział tworzy listę zadań. Na podstawie tej listy planista tworzy harmonogram ustawiając listę w kolejkę. Planista bierze pod uwagę terminy realizacji.</text:span></text:p>
      <text:p text:style-name="P4">2. Lista zadań.</text:p>
      <text:p text:style-name="P4">Lista zadań to uporządkowana lista w której skład wchodzą zamówienia zgodnie z ustaleniami w poprzednim kroku czyli harmonogramie.</text:p>
      <text:p text:style-name="P4">3. Wycena.</text:p>
      <text:p text:style-name="P4">Jeżeli na liście zadań zajdzie się zapytanie o wycenę produktu w tym miejscu następuje wykonanie wyceny. Wycena polega na:</text:p>
      <text:p text:style-name="P4">- <text:span text:style-name="T3">nadanie numeru produktu (xxx-xxxx-xxx)</text:span></text:p>
      <text:p text:style-name="P4">- <text:span text:style-name="T3">Wykonanie BOM</text:span></text:p>
      <text:p text:style-name="P4">- <text:span text:style-name="T3">Przygotowanie rysunku przez konstruktorów. Konstruktor musi oprócz plików modelu przygotować plik kroju na 1 sztukę wyrobu i umieścić go w katalogu IA, przygotować listę metrów szycia, metrów zgrzewania, długości użytych pasów i ich ilość, i wszelkich możliwych informacji które można wyciągnąć z gotowego rysunku.</text:span></text:p>
      <text:p text:style-name="P4"><text:tab/></text:p>
      <text:p text:style-name="P4"/>
      <text:p text:style-name="P5">4. Technologia.</text:p>
      <text:p text:style-name="P5"/>
      <text:p text:style-name="P5">5. Dokumentacja.</text:p>
      <text:p text:style-name="P5"/>
      <text:p text:style-name="P5">6. Plan produkcji.</text:p>
      <text:p text:style-name="P5"/>
      <text:p text:style-name="P5">7. Realizacja.</text:p>
      <text:p text:style-name="P5"/>
      <text:p text:style-name="P5">8. Raport walidacji czasó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19:43:19.023027734</meta:creation-date>
    <dc:date>2026-06-18T20:20:45.881449291</dc:date>
    <meta:editing-duration>PT24M54S</meta:editing-duration>
    <meta:editing-cycles>4</meta:editing-cycles>
    <meta:generator>LibreOffice/25.8.7.3$Linux_X86_64 LibreOffice_project/580$Build-3</meta:generator>
    <meta:document-statistic meta:table-count="0" meta:image-count="0" meta:object-count="0" meta:page-count="1" meta:paragraph-count="18" meta:word-count="256" meta:character-count="1811" meta:non-whitespace-character-count="1571"/>
  </office:meta>
</office:document-meta>
</file>