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381c" officeooo:paragraph-rsid="0009381c"/>
    </style:style>
    <style:style style:name="P2" style:family="paragraph" style:parent-style-name="Standard">
      <style:text-properties officeooo:rsid="00098067" officeooo:paragraph-rsid="00098067"/>
    </style:style>
    <style:style style:name="P3" style:family="paragraph" style:parent-style-name="Standard">
      <style:text-properties officeooo:rsid="00098067" officeooo:paragraph-rsid="000aeb52"/>
    </style:style>
    <style:style style:name="P4" style:family="paragraph" style:parent-style-name="Standard">
      <style:text-properties officeooo:rsid="000aeb52" officeooo:paragraph-rsid="000aeb52"/>
    </style:style>
    <style:style style:name="P5" style:family="paragraph" style:parent-style-name="Standard">
      <style:text-properties officeooo:rsid="000aeb52" officeooo:paragraph-rsid="000e29b8"/>
    </style:style>
    <style:style style:name="P6" style:family="paragraph" style:parent-style-name="Standard">
      <style:text-properties officeooo:rsid="000d494e" officeooo:paragraph-rsid="000d494e"/>
    </style:style>
    <style:style style:name="T1" style:family="text">
      <style:text-properties officeooo:rsid="00098067"/>
    </style:style>
    <style:style style:name="T2" style:family="text">
      <style:text-properties officeooo:rsid="000aeb52"/>
    </style:style>
    <style:style style:name="T3" style:family="text">
      <style:text-properties officeooo:rsid="000c8e57"/>
    </style:style>
    <style:style style:name="T4" style:family="text">
      <style:text-properties officeooo:rsid="000e29b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ystem Wycen Technologii i Planowania</text:p>
      <text:p text:style-name="P1"/>
      <text:p text:style-name="P1">Generuj kod źródłowy z obszernymi komentarzami w języku polskim.</text:p>
      <text:p text:style-name="P1">Celem jest stworzenie aplikacji docelowo do umieszczenia na serwerze lokalnym firmy i do wykorzystania w formowej sieci LAN. Aplikacja ma wspomagać system wycen produktów, konstruowania technologii i sposobu planowania produkcji. <text:span text:style-name="T1">Aplikacja działa na podstawie następujących po sobie kroków, niektóre z kroków będą wymagały zagłębienia się w szczegóły w takim przypadku idealnie od strony interfejsu byłoby wprowadzenie kard. Początkowo przewiduje dla aplikacji bazę danych SQLite być może z możliwością późniejszej zmiany na bardziej zaawansowaną bazę danych. Do aplikacji trzeba się będzie zalogować w celu ustalenia tożsamości użytkownika.</text:span></text:p>
      <text:p text:style-name="P1"/>
      <text:p text:style-name="P2">1. Harmonogram.</text:p>
      <text:p text:style-name="P3">Pierwszym etapem <text:span text:style-name="T2">jest stworzenie harmonogramu. Do firmy przychodzą zapytania od klientów i zamówienia. Przychodzą one do działu ORDERS albo z centrali w Danii i ten dział tworzy listę zadań. Na podstawie tej listy planista tworzy harmonogram ustawiając listę w kolejkę. Planista bierze pod uwagę terminy realizacji.</text:span></text:p>
      <text:p text:style-name="P4">2. Lista zadań.</text:p>
      <text:p text:style-name="P4">Lista zadań to uporządkowana lista w której skład wchodzą zamówienia zgodnie z ustaleniami w poprzednim kroku czyli harmonogramie.</text:p>
      <text:p text:style-name="P4">3. Wycena.</text:p>
      <text:p text:style-name="P4">Jeżeli na liście zadań zajdzie się zapytanie o wycenę produktu w tym miejscu następuje wykonanie wyceny. Wycena polega na:</text:p>
      <text:p text:style-name="P4">- <text:span text:style-name="T3">nadanie numeru produktu (xxx-xxxx-xxx) – </text:span><text:span text:style-name="T4">nadanie numeru wiąże się z (nadaniem tożsamości produktowi) i wygenerowaniu karty produktu.</text:span></text:p>
      <text:p text:style-name="P5">- <text:span text:style-name="T3">Przygotowanie rysunku przez konstruktorów. Konstruktor musi oprócz plików modelu przygotować plik kroju na 1 sztukę wyrobu i umieścić go w katalogu IA, przygotować listę metrów szycia, metrów zgrzewania, długości użytych pasów i ich ilość, i wszelkich możliwych informacji które można wyciągnąć z gotowego rysunku.</text:span></text:p>
      <text:p text:style-name="P5">- <text:span text:style-name="T3">Wykonanie BOM</text:span></text:p>
      <text:p text:style-name="P4">- <text:span text:style-name="T4">Przyporządkowanie procesów produkcyjnych do konkretnych maszyn, W przypadku prac ręcznych do ludzi bądź grup ludzi. Tabela z listą maszyn, do każdej maszyny lista możliwych do wykonania procesów, do każdego procesu czas standardowy czas wykonania wykonania tego procesu (możliwość korekty czasu standardowego ze względy na przykład na wielki gabaryt produktu). Każda maszyna ma określony koszt pracy jednej godziny procesu</text:span></text:p>
      <text:p text:style-name="P4">- <text:span text:style-name="T4">Obliczenie sumaryczne: koszty materiału (BOM) + robocizna(suma czasu na maszynach pomnożona przez koszt procesu.</text:span></text:p>
      <text:p text:style-name="P4"/>
      <text:p text:style-name="P4"/>
      <text:p text:style-name="P6">4. Technologia.</text:p>
      <text:p text:style-name="P6"/>
      <text:p text:style-name="P6"/>
      <text:p text:style-name="P6">5. Dokumentacja.</text:p>
      <text:p text:style-name="P6"/>
      <text:p text:style-name="P6">6. Plan produkcji.</text:p>
      <text:p text:style-name="P6"/>
      <text:p text:style-name="P6">7. Realizacja.</text:p>
      <text:p text:style-name="P6"/>
      <text:p text:style-name="P6">8. Raport walidacji czasów.</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6-18T19:43:19.023027734</meta:creation-date>
    <dc:date>2026-06-18T21:31:42.747759089</dc:date>
    <meta:editing-duration>PT29M20S</meta:editing-duration>
    <meta:editing-cycles>5</meta:editing-cycles>
    <meta:generator>LibreOffice/25.8.7.3$Linux_X86_64 LibreOffice_project/580$Build-3</meta:generator>
    <meta:document-statistic meta:table-count="0" meta:image-count="0" meta:object-count="0" meta:page-count="1" meta:paragraph-count="19" meta:word-count="342" meta:character-count="2442" meta:non-whitespace-character-count="2118"/>
  </office:meta>
</office:document-meta>
</file>